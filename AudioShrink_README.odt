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0400000040961A8E51.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Songti SC" svg:font-family="'Songti SC'" style:font-family-generic="system" style:font-pitch="variable"/>
  </office:font-face-decls>
  <office:automatic-styles>
    <style:style style:name="Tabelle1" style:family="table">
      <style:table-properties style:width="16.51cm" style:rel-width="100%" fo:margin-left="0cm" fo:margin-top="0cm" fo:margin-bottom="0cm" table:align="left" fo:background-color="#e1e2e4" style:writing-mode="lr-tb">
        <style:background-image/>
      </style:table-properties>
    </style:style>
    <style:style style:name="Tabelle1.A" style:family="table-column">
      <style:table-column-properties style:column-width="16.51cm" style:rel-column-width="65535*"/>
    </style:style>
    <style:style style:name="Tabelle1.A1" style:family="table-cell">
      <style:table-cell-properties fo:background-color="#e1e2e4" fo:padding-left="0.265cm" fo:padding-right="0.265cm" fo:padding-top="0.106cm" fo:padding-bottom="0.106cm" fo:border="none" style:writing-mode="lr-tb">
        <style:background-image/>
      </style:table-cell-properties>
    </style:style>
    <style:style style:name="Tabelle2" style:family="table">
      <style:table-properties style:width="16.51cm" style:rel-width="100%" fo:margin-left="0cm" fo:margin-top="0cm" fo:margin-bottom="0cm" table:align="left" fo:background-color="#e1e2e4" style:writing-mode="lr-tb">
        <style:background-image/>
      </style:table-properties>
    </style:style>
    <style:style style:name="Tabelle2.A" style:family="table-column">
      <style:table-column-properties style:column-width="16.51cm" style:rel-column-width="65535*"/>
    </style:style>
    <style:style style:name="Tabelle2.A1" style:family="table-cell">
      <style:table-cell-properties fo:background-color="#e1e2e4" fo:padding-left="0.265cm" fo:padding-right="0.265cm" fo:padding-top="0.106cm" fo:padding-bottom="0.106cm" fo:border="none" style:writing-mode="lr-tb">
        <style:background-image/>
      </style:table-cell-properties>
    </style:style>
    <style:style style:name="Tabelle3" style:family="table">
      <style:table-properties style:width="16.51cm" style:rel-width="100%" fo:margin-left="0cm" fo:margin-top="0cm" fo:margin-bottom="0cm" table:align="left" fo:background-color="#e1e2e4" style:writing-mode="lr-tb">
        <style:background-image/>
      </style:table-properties>
    </style:style>
    <style:style style:name="Tabelle3.A" style:family="table-column">
      <style:table-column-properties style:column-width="16.51cm" style:rel-column-width="65535*"/>
    </style:style>
    <style:style style:name="Tabelle3.A1" style:family="table-cell">
      <style:table-cell-properties fo:background-color="#e1e2e4" fo:padding-left="0.265cm" fo:padding-right="0.265cm" fo:padding-top="0.106cm" fo:padding-bottom="0.106cm" fo:border="none" style:writing-mode="lr-tb">
        <style:background-image/>
      </style:table-cell-properties>
    </style:style>
    <style:style style:name="Tabelle4" style:family="table">
      <style:table-properties style:width="16.51cm" style:rel-width="100%" fo:margin-left="0cm" fo:margin-top="0cm" fo:margin-bottom="0cm" table:align="left" fo:background-color="#e1e2e4" style:writing-mode="lr-tb">
        <style:background-image/>
      </style:table-properties>
    </style:style>
    <style:style style:name="Tabelle4.A" style:family="table-column">
      <style:table-column-properties style:column-width="16.51cm" style:rel-column-width="65535*"/>
    </style:style>
    <style:style style:name="Tabelle4.A1" style:family="table-cell">
      <style:table-cell-properties fo:background-color="#e1e2e4" fo:padding-left="0.265cm" fo:padding-right="0.265cm" fo:padding-top="0.106cm" fo:padding-bottom="0.106cm" fo:border="none" style:writing-mode="lr-tb">
        <style:background-image/>
      </style:table-cell-properties>
    </style:style>
    <style:style style:name="P1" style:family="paragraph" style:parent-style-name="List_20_Paragraph" style:list-style-name="WWNum1"/>
    <style:style style:name="P2" style:family="paragraph" style:parent-style-name="List_20_Paragraph" style:list-style-name="WWNum2"/>
    <style:style style:name="P3" style:family="paragraph" style:parent-style-name="Standard">
      <style:paragraph-properties fo:margin-top="0.106cm" fo:margin-bottom="0.106cm" style:contextual-spacing="false" fo:line-height="100%" fo:text-align="left" style:justify-single-word="false" fo:orphans="2" fo:widows="2"/>
      <style:text-properties style:font-name="Consolas" fo:font-size="10pt" style:letter-kerning="false" style:font-size-asian="10pt" style:font-size-complex="10pt"/>
    </style:style>
    <style:style style:name="P4" style:family="paragraph" style:parent-style-name="List_20_Paragraph" style:list-style-name="WWNum3"/>
    <style:style style:name="P5" style:family="paragraph" style:parent-style-name="List_20_Paragraph" style:list-style-name="WWNum4"/>
    <style:style style:name="P6" style:family="paragraph" style:parent-style-name="List_20_Paragraph" style:list-style-name="WWNum5"/>
    <style:style style:name="P7" style:family="paragraph" style:parent-style-name="List_20_Paragraph" style:list-style-name="WWNum6"/>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udioShrink README</text:p>
      <text:p text:style-name="Heading_20_1"><text:bookmark-start text:name="audioshrink_readme"/>AudioShrink - README<text:bookmark-end text:name="audioshrink_readme"/></text:p>
      <text:p text:style-name="Heading_20_2"><text:bookmark-start text:name="überblick"/>Überblick<text:bookmark-end text:name="überblick"/></text:p>
      <text:p text:style-name="Standard">AudioShrink ist ein Tool zur automatischen Verkleinerung großer Musiksammlungen, indem es Audioformate wie FLAC, WAV, MP3 oder bereits vorhandene Opus-Dateien analysiert, optimiert und - falls sinnvoll - in effiziente Opus-Dateien umwandelt. Ziel ist es, aus einer großen, heterogenen Sammlung eine kompakte, mobile und qualitativ hochwertige Version zu erzeugen, die ideal für Smartphones, Tablets oder portable Player ist.</text:p>
      <text:p text:style-name="Heading_20_2"><text:bookmark-start text:name="features"/>Features<text:bookmark-end text:name="features"/></text:p>
      <text:list xml:id="list2557015398" text:style-name="WWNum1">
        <text:list-item>
          <text:p text:style-name="P1">Automatische Transkodierung von FLAC/WAV → Opus</text:p>
        </text:list-item>
        <text:list-item>
          <text:p text:style-name="P1">Intelligente Bitratenwahl basierend auf Samplerate, Genre, Dateigröße oder Tracklänge</text:p>
        </text:list-item>
        <text:list-item>
          <text:p text:style-name="P1">Tag-Übernahme (Titel, Album, Artist, Cover, ...)</text:p>
        </text:list-item>
        <text:list-item>
          <text:p text:style-name="P1">Batch-Verarbeitung kompletter Ordnerstrukturen</text:p>
        </text:list-item>
        <text:list-item>
          <text:p text:style-name="P1">Cover-Optimierung (z. ... verkleinern oder entfernen)</text:p>
        </text:list-item>
        <text:list-item>
          <text:p text:style-name="P1">Log-Ausgabe für jeden Verarbeitungsschritt</text:p>
        </text:list-item>
        <text:list-item>
          <text:p text:style-name="P1">Keine Re-Encodes, wenn nicht sinnvoll (z. ... MP3 → Opus nur optional)</text:p>
        </text:list-item>
      </text:list>
      <text:p text:style-name="Heading_20_2"><text:bookmark-start text:name="motivation"/>Motivation<text:bookmark-end text:name="motivation"/></text:p>
      <text:p text:style-name="Standard">Viele Nutzer besitzen große Musikarchive (200-500 GB), die für mobile Geräte zu groß sind. AudioShrink erzeugt daraus eine kompakte 10-20 % Version, ohne hörbare Qualitätsverluste.</text:p>
      <text:p text:style-name="Standard">Beispiel: 500 GB FLAC → 60-80 GB Opus (96-128 kbps)</text:p>
      <text:p text:style-name="Heading_20_2"><text:bookmark-start text:name="installation"/>Installation<text:bookmark-end text:name="installation"/></text:p>
      <text:p text:style-name="Standard">AudioShrink kann als Shell-Script, Python-Tool oder CLI-Programm genutzt werden.</text:p>
      <text:p text:style-name="Standard"><text:soft-page-break/>Abhängigkeiten:</text:p>
      <text:list xml:id="list101108910026064" text:continue-list="list2557015398" text:style-name="WWNum2">
        <text:list-item>
          <text:p text:style-name="P2">ffmpeg</text:p>
        </text:list-item>
        <text:list-item>
          <text:p text:style-name="P2">ffprobe</text:p>
        </text:list-item>
        <text:list-item>
          <text:p text:style-name="P2">opusenc</text:p>
        </text:list-item>
        <text:list-item>
          <text:p text:style-name="P2">metaflac (optional für FLAC-Tags)</text:p>
        </text:list-item>
      </text:list>
      <text:p text:style-name="Standard">Installation unter Linux:</text:p>
      <table:table table:name="Tabelle1" table:style-name="Tabelle1">
        <table:table-column table:style-name="Tabelle1.A"/>
        <table:table-row>
          <table:table-cell table:style-name="Tabelle1.A1" office:value-type="string">
            <text:p text:style-name="P3">sudo apt install ffmpeg opus-tools flac</text:p>
          </table:table-cell>
        </table:table-row>
      </table:table>
      <text:p text:style-name="Heading_20_2"><text:bookmark-start text:name="verwendung"/>Verwendung<text:bookmark-end text:name="verwendung"/></text:p>
      <text:p text:style-name="Heading_20_3"><text:bookmark-start text:name="h_1_quelle_und_ziel_definieren"/>1. Quelle und Ziel definieren<text:bookmark-end text:name="h_1_quelle_und_ziel_definieren"/></text:p>
      <table:table table:name="Tabelle2" table:style-name="Tabelle2">
        <table:table-column table:style-name="Tabelle2.A"/>
        <table:table-row>
          <table:table-cell table:style-name="Tabelle2.A1" office:value-type="string">
            <text:p text:style-name="P3">./audioshrink.sh /pfad/zur/musik /pfad/zur/kompakten_sammlung</text:p>
          </table:table-cell>
        </table:table-row>
      </table:table>
      <text:p text:style-name="Heading_20_3"><text:bookmark-start text:name="h_2_automatische_bitratenwahl_beispiel"/>2. Automatische Bitratenwahl (Beispiel)<text:bookmark-end text:name="h_2_automatische_bitratenwahl_beispiel"/></text:p>
      <text:list xml:id="list101108956247908" text:continue-list="list101108910026064" text:style-name="WWNum3">
        <text:list-item>
          <text:p text:style-name="P4">≥ 96 kHz → 160 kbps</text:p>
        </text:list-item>
        <text:list-item>
          <text:p text:style-name="P4">≥ 48 kHz → 128 kbps</text:p>
        </text:list-item>
        <text:list-item>
          <text:p text:style-name="P4">darunter → 96 kbps</text:p>
        </text:list-item>
      </text:list>
      <text:p text:style-name="Heading_20_3"><text:bookmark-start text:name="h_3_beispiel_encoding"/>3. Beispiel-Encoding<text:bookmark-end text:name="h_3_beispiel_encoding"/></text:p>
      <table:table table:name="Tabelle3" table:style-name="Tabelle3">
        <table:table-column table:style-name="Tabelle3.A"/>
        <table:table-row>
          <table:table-cell table:style-name="Tabelle3.A1" office:value-type="string">
            <text:p text:style-name="P3">opusenc --bitrate "$BITRATE_OPUS" --vbr --music --framesize 20 "$source" "$target"</text:p>
          </table:table-cell>
        </table:table-row>
      </table:table>
      <text:p text:style-name="Heading_20_2"><text:bookmark-start text:name="ordnerstruktur"/>Ordnerstruktur<text:bookmark-end text:name="ordnerstruktur"/></text:p>
      <text:p text:style-name="Standard">Die Ordnerstruktur im Zielverzeichnis wird exakt so dargestellt wie in der Quelle. Es entsteht somit eine mehr oder weniger identische Spiegelung der Verzeichnisstruktur zwischen Quelle und Ziel, inklusive aller Unterordner und Dateien.</text:p>
      <table:table table:name="Tabelle4" table:style-name="Tabelle4">
        <table:table-column table:style-name="Tabelle4.A"/>
        <table:table-row>
          <table:table-cell table:style-name="Tabelle4.A1" office:value-type="string">
            <text:p text:style-name="P3">Ziel/<text:line-break/> ├── Artist/<text:line-break/> │ <text:s text:c="3"/>├── Album/<text:line-break/> │ <text:s text:c="3"/>│ <text:s text:c="4"/>├── 01 Track.opus<text:line-break/> │ <text:s text:c="3"/>│ <text:s text:c="4"/>├── 02 Track.opus<text:line-break/> │ <text:s text:c="3"/>│ <text:s text:c="4"/>└── cover.jpg</text:p>
          </table:table-cell>
        </table:table-row>
      </table:table>
      <text:p text:style-name="Heading_20_2"><text:bookmark-start text:name="wie_audioshrink_entscheidet"/><text:soft-page-break/>Wie AudioShrink entscheidet<text:bookmark-end text:name="wie_audioshrink_entscheidet"/></text:p>
      <text:list text:style-name="WWNum4">
        <text:list-item>
          <text:p text:style-name="P5">Datei analysieren</text:p>
        </text:list-item>
        <text:list-item>
          <text:p text:style-name="P5">Samplerate, Bitrate, Codec, Tags auslesen</text:p>
        </text:list-item>
        <text:list-item>
          <text:p text:style-name="P5">Entscheidung: behalten, neu encodieren oder überspringen</text:p>
        </text:list-item>
        <text:list-item>
          <text:p text:style-name="P5">Opus-Encoding mit optimalen Parametern</text:p>
        </text:list-item>
        <text:list-item>
          <text:p text:style-name="P5">Tags übernehmen</text:p>
        </text:list-item>
        <text:list-item>
          <text:p text:style-name="P5">Log schreiben</text:p>
        </text:list-item>
      </text:list>
      <text:p text:style-name="Heading_20_2"><text:bookmark-start text:name="unterstützte_formate"/>Unterstützte Formate<text:bookmark-end text:name="unterstützte_formate"/></text:p>
      <text:list xml:id="list101109520548695" text:continue-list="list101108956247908" text:style-name="WWNum5">
        <text:list-item>
          <text:p text:style-name="P6">FLAC</text:p>
        </text:list-item>
        <text:list-item>
          <text:p text:style-name="P6">WAV</text:p>
        </text:list-item>
        <text:list-item>
          <text:p text:style-name="P6">MP3</text:p>
        </text:list-item>
        <text:list-item>
          <text:p text:style-name="P6">Opus</text:p>
        </text:list-item>
        <text:list-item>
          <text:p text:style-name="P6">AAC</text:p>
        </text:list-item>
        <text:list-item>
          <text:p text:style-name="P6">optional weitere</text:p>
        </text:list-item>
      </text:list>
      <text:p text:style-name="Heading_20_2"><text:bookmark-start text:name="roadmap"/>Roadmap<text:bookmark-end text:name="roadmap"/></text:p>
      <text:list text:continue-list="list101109520548695" text:style-name="WWNum6">
        <text:list-item>
          <text:p text:style-name="P7">offen</text:p>
        </text:list-item>
      </text:list>
      <text:p text:style-name="Heading_20_2"><text:bookmark-start text:name="lizenz"/>Lizenz<text:bookmark-end text:name="lizenz"/></text:p>
      <text:p text:style-name="Standard">MIT-Lizenz oder GPLv3 - je nach Projektziel.</text:p>
      <text:p text:style-name="Heading_20_2"><text:bookmark-start text:name="beiträge"/>Beiträge<text:bookmark-end text:name="beiträge"/></text:p>
      <text:p text:style-name="Standard">Pull Requests, Bug Reports und Feature-Vorschläge sind willkommen.</text:p>
      <text:p text:style-name="Heading_20_2"><text:bookmark-start text:name="beispiel_use_case"/>Beispiel-Use-Case<text:bookmark-end text:name="beispiel_use_case"/></text:p>
      <text:p text:style-name="Standard">Du hast 300 GB Musik (FLAC, MP3, WAV). AudioShrink erzeugt daraus eine kompakte 40-50 GB Opus-Bibliothek, die gleich klingt, weniger Speicher braucht, einheitlich formatiert ist und perfekt für Handy/Tablet i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Songti SC" svg:font-family="'Songti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de" fo:country="DE" style:letter-kerning="false" style:font-name-asian="Songti SC" style:font-size-asian="12pt" style:language-asian="zh" style:country-asian="CN" style:font-name-complex="Arial Unicode MS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2pt" fo:language="de" fo:country="DE" style:letter-kerning="false" style:font-name-asian="Songti SC" style:font-size-asian="12pt" style:language-asian="zh" style:country-asian="CN" style:font-name-complex="Arial Unicode MS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line-height="150%"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class="chapter">
      <style:paragraph-properties fo:margin-top="0.635cm" fo:margin-bottom="0.106cm" style:contextual-spacing="false"/>
      <style:text-properties fo:font-size="14pt" fo:font-weight="bold" style:font-size-asian="14pt" style:font-weight-asian="bold"/>
    </style:style>
    <style:style style:name="Heading_20_2" style:display-name="Heading 2" style:family="paragraph" style:parent-style-name="Standard" style:class="chapter">
      <style:paragraph-properties fo:margin-top="0.635cm" fo:margin-bottom="0.106cm" style:contextual-spacing="false"/>
      <style:text-properties fo:font-size="12pt" fo:font-weight="bold" style:font-size-asian="12pt" style:font-weight-asian="bold"/>
    </style:style>
    <style:style style:name="Heading_20_3" style:display-name="Heading 3" style:family="paragraph" style:parent-style-name="Standard" style:class="chapter">
      <style:paragraph-properties fo:margin-top="0.635cm" fo:margin-bottom="0.106cm" style:contextual-spacing="false"/>
      <style:text-properties fo:font-size="12pt" fo:font-weight="bold" style:font-size-asian="12pt" style:font-weight-asian="bold"/>
    </style:style>
    <style:style style:name="List_20_Paragraph" style:display-name="List Paragraph" style:family="paragraph" style:parent-style-name="Standard">
      <style:paragraph-properties fo:margin-left="0.635cm" fo:margin-top="0.106cm" fo:margin-bottom="0.106cm" style:contextual-spacing="true"/>
    </style:style>
    <style:style style:name="Title" style:family="paragraph" style:parent-style-name="Standard" style:class="chapter">
      <style:paragraph-properties fo:margin-top="0.423cm" fo:margin-bottom="0.423cm" style:contextual-spacing="false" fo:text-align="center" style:justify-single-word="false"/>
      <style:text-properties fo:font-size="16pt" fo:font-weight="bold" style:font-size-asian="16pt" style:font-weight-asian="bold"/>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Code" style:family="text">
      <style:text-properties style:font-name="Consolas" fo:font-family="Consolas" style:font-family-generic="roman" style:font-pitch="variable" fo:background-color="#e1e2e4"/>
    </style:style>
    <style:style style:name="Internet_20_link" style:display-name="Internet link" style:family="tex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Regular" style:font-pitch="variable"/>
      </text:list-level-style-bullet>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text:list-level-style-bullet>
      <text:list-level-style-bullet text:level="2" text:style-name="ListLabel_20_5"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Regular" style:font-pitch="variable"/>
      </text:list-level-style-bullet>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text:list-level-style-bullet>
      <text:list-level-style-bullet text:level="2" text:style-name="ListLabel_20_8"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3" text:style-name="ListLabel_20_9"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Regular" style:font-pitch="variable"/>
      </text:list-level-style-bullet>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text:list-level-style-bullet>
      <text:list-level-style-bullet text:level="2" text:style-name="ListLabel_20_14"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Regular" style:font-pitch="variable"/>
      </text:list-level-style-bullet>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text:list-level-style-bullet>
      <text:list-level-style-bullet text:level="2" text:style-name="ListLabel_20_17"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3" text:style-name="ListLabel_20_18"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Regular" style:font-pitch="variable"/>
      </text:list-level-style-bullet>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7.056cm"/>
    </style:style>
    <style:style style:name="MT1" style:family="text">
      <style:text-properties fo:font-size="8pt" style:font-size-asian="8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59cm" fo:page-height="27.94cm" style:num-format="1" style:print-orientation="portrait" fo:margin-top="2.54cm" fo:margin-bottom="0.953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588cm" fo:margin-left="0cm" fo:margin-right="0cm" fo:margin-top="1.487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Copilot Logo" text:anchor-type="char" svg:x="0cm" svg:y="0.131cm" svg:width="2.032cm" svg:height="0.499cm" draw:z-index="2"><draw:image xlink:href="Pictures/100000010000010400000040961A8E51.png" xlink:type="simple" xlink:show="embed" xlink:actuate="onLoad" draw:mime-type="image/png"/></draw:frame><text:span text:style-name="MT1">Copilot may make mistakes</text:span><text:tab/></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Kopie]AudioShrink README</dc:title>
    <meta:initial-creator>Microsoft Copilot</meta:initial-creator>
    <meta:creation-date>2026-06-23T08:09:58.537625600</meta:creation-date>
    <dc:date>2026-06-23T10:11:07.904855000</dc:date>
    <dc:creator>Guido Ledermann</dc:creator>
    <meta:editing-duration>PT33S</meta:editing-duration>
    <meta:editing-cycles>1</meta:editing-cycles>
    <meta:document-statistic meta:table-count="4" meta:image-count="1" meta:object-count="0" meta:page-count="3" meta:paragraph-count="59" meta:word-count="384" meta:character-count="2686" meta:non-whitespace-character-count="2362"/>
    <meta:generator>LibreOffice/26.2.1.2$MacOSX_AARCH64 LibreOffice_project/8399f6259d8c87f40e7255cdb3c9b958f5e08948</meta:generator>
  </office:meta>
</office:document-meta>
</file>